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C2000001F6FC08B84B.png" manifest:media-type="image/png"/>
  <manifest:file-entry manifest:full-path="Pictures/10000001000008F6000003A6B9D76B64.png" manifest:media-type="image/png"/>
  <manifest:file-entry manifest:full-path="Pictures/10000000000003740000014626AA6527.jpg" manifest:media-type="image/jpeg"/>
  <manifest:file-entry manifest:full-path="Pictures/100000000000023A0000023A344F9C87.jpg" manifest:media-type="image/jpeg"/>
  <manifest:file-entry manifest:full-path="Pictures/1000000100001D3900000D1A57282D28.png" manifest:media-type="image/png"/>
  <manifest:file-entry manifest:full-path="Pictures/100000000000055500000800582F8EEC.jpg" manifest:media-type="image/jpeg"/>
  <manifest:file-entry manifest:full-path="Pictures/10000000000007CA000002BCB2907DE8.jpg" manifest:media-type="image/jpeg"/>
  <manifest:file-entry manifest:full-path="Pictures/10000000000009C400000682BDC7682B.jpg" manifest:media-type="image/jpeg"/>
  <manifest:file-entry manifest:full-path="Pictures/100000000000038E00000200D6CD562E.jpg" manifest:media-type="image/jpeg"/>
  <manifest:file-entry manifest:full-path="Pictures/100000010000053000000242A24733A1.png" manifest:media-type="image/png"/>
  <manifest:file-entry manifest:full-path="Pictures/10000001000009AA000009AAC5FD6B9A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Barlow" svg:font-family="Barlow"/>
    <style:font-face style:name="Barlow Medium" svg:font-family="'Barlow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" svg:font-family="Poppins"/>
    <style:font-face style:name="Poppins Light" svg:font-family="'Poppins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Default_20_Drawing_20_Style_5f_1">
      <style:graphic-properties draw:stroke="none" svg:stroke-width="0cm" draw:fill="solid" draw:fill-color="#003595" draw:textarea-horizontal-align="justify" draw:textarea-vertical-align="middle" draw:auto-grow-height="false" draw:fit-to-size="false" style:shrink-to-fit="false" fo:min-height="18.796cm" fo:min-width="13.885cm" fo:padding-top="0.127cm" fo:padding-bottom="0.127cm" fo:padding-left="0.254cm" fo:padding-right="0.254cm" fo:wrap-option="wrap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444cm, 0cm, 6.481cm)" draw:image-opacity="100%" style:mirror="none" loext:decorative="false"/>
    </style:style>
    <style:style style:name="gr5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Default_20_Drawing_20_Style_5f_1">
      <style:graphic-properties draw:stroke="none" svg:stroke-width="0cm" draw:fill="solid" draw:fill-color="#28aae2" draw:textarea-horizontal-align="justify" draw:textarea-vertical-align="middle" draw:auto-grow-height="false" draw:fit-to-size="false" style:shrink-to-fit="false" fo:min-height="0cm" fo:min-width="0.253cm" fo:padding-top="0.074cm" fo:padding-bottom="0.074cm" fo:padding-left="0.254cm" fo:padding-right="0.254cm" fo:wrap-option="wrap" loext:decorative="false">
        <loext:fill-complex-color loext:theme-type="accent2" loext:color-type="theme"/>
      </style:graphic-properties>
    </style:style>
    <style:style style:name="gr8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87cm" fo:min-width="0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width="0cm" draw:fill="solid" draw:fill-color="#003595" draw:textarea-horizontal-align="justify" draw:textarea-vertical-align="middle" draw:auto-grow-height="false" draw:fit-to-size="false" style:shrink-to-fit="false" fo:min-height="9.271cm" fo:min-width="11.345cm" fo:padding-top="0.127cm" fo:padding-bottom="0.127cm" fo:padding-left="0.254cm" fo:padding-right="0.254cm" fo:wrap-option="wrap" loext:decorative="false">
        <loext:fill-complex-color loext:theme-type="accent1" loext:color-type="theme"/>
      </style:graphic-properties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2cm, 0cm, 1.541cm, 0cm)" draw:image-opacity="100%" style:mirror="none" loext:decorative="false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28aae2" draw:textarea-horizontal-align="justify" draw:textarea-vertical-align="middle" draw:auto-grow-height="false" draw:fit-to-size="false" style:shrink-to-fit="false" fo:min-height="0cm" fo:min-width="0.253cm" fo:padding-top="0.074cm" fo:padding-bottom="0.074cm" fo:padding-left="0.254cm" fo:padding-right="0.254cm" fo:wrap-option="wrap" loext:decorative="false">
        <loext:fill-complex-color loext:theme-type="accent2" loext:color-type="theme"/>
      </style:graphic-properties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87cm" fo:min-width="0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3cm" fo:min-width="0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_20_Slide_20_2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_20_Slide_20_3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00359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solid" draw:fill-color="#28aae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Arial1" fo:font-size="44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" fo:font-size="36pt" fo:letter-spacing="normal" fo:language="en" fo:country="U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28aae2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accent2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6pt" fo:letter-spacing="normal" fo:language="en" fo:country="US" fo:font-style="normal" style:text-underline-style="none" fo:font-weight="normal" fo:background-color="transparent" style:font-name-asian="Poppins Light" style:font-size-asian="16pt" style:font-style-asian="normal" style:font-weight-asian="normal" style:font-name-complex="Poppins Light" style:font-size-complex="16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rlow" fo:font-size="9pt" fo:letter-spacing="normal" fo:language="en" fo:country="US" fo:font-style="normal" style:text-underline-style="none" fo:font-weight="normal" fo:background-color="transparent" style:font-name-asian="Barlow" style:font-size-asian="9pt" style:font-style-asian="normal" style:font-weight-asian="normal" style:font-name-complex="Barlow" style:font-size-complex="9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28aae2" loext:opacity="100%" style:text-outline="false" style:text-line-through-style="none" style:text-line-through-type="none" style:text-position="0% 100%" style:font-name="Poppins Light" fo:font-size="9pt" fo:letter-spacing="normal" fo:language="en" fo:country="US" fo:font-style="normal" style:text-underline-style="none" fo:font-weight="normal" fo:background-color="transparent" style:font-name-asian="Poppins Light" style:font-size-asian="9pt" style:font-style-asian="normal" style:font-weight-asian="normal" style:font-name-complex="Poppins Light" style:font-size-complex="9pt" style:font-style-complex="normal" style:font-weight-complex="normal">
        <loext:char-complex-color loext:theme-type="accent2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9pt" fo:letter-spacing="normal" fo:language="en" fo:country="US" fo:font-style="normal" style:text-underline-style="none" fo:font-weight="normal" fo:background-color="transparent" style:font-name-asian="Poppins Light" style:font-size-asian="9pt" style:font-style-asian="normal" style:font-weight-asian="normal" style:font-name-complex="Poppins Light" style:font-size-complex="9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3595" loext:opacity="100%" style:text-outline="false" style:text-line-through-style="none" style:text-line-through-type="none" style:text-position="0% 100%" style:font-name="Barlow" fo:font-size="36pt" fo:letter-spacing="normal" fo:language="en" fo:country="U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6pt" fo:letter-spacing="normal" fo:language="en" fo:country="US" fo:font-style="normal" style:text-underline-style="none" fo:font-weight="normal" fo:background-color="transparent" style:font-name-asian="Poppins Light" style:font-size-asian="16pt" style:font-style-asian="normal" style:font-weight-asian="normal" style:font-name-complex="Poppins Light" style:font-size-complex="16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super 58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8aa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OWASP Bristol Chapter Meeting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9.21cm" svg:height="5.08cm" svg:x="1.905cm" svg:y="1.905cm" presentation:class="title" presentation:user-transformed="true">
          <draw:text-box>
            <text:p text:style-name="P1"><text:span text:style-name="T1">OWASP Bristol Chapter</text:span><text:span text:style-name="T1"><text:line-break/></text:span><text:span text:style-name="T1">June 2026 meeting</text:span><text:span text:style-name="T2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1" draw:text-style-name="P3" draw:layer="layout" svg:width="21.621cm" svg:height="12.164cm" svg:x="5.715cm" svg:y="6.146cm">
          <draw:image xlink:href="Pictures/100000000000038E00000200D6CD562E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2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4">Change this to your local chapter name. Add any host or food/beverage sponsor logos you need. Look at OWASP London for a chapter that has localized its front slide. Your custom slide must have the OWASP logo on it, but that’s the only restriction to changing the front slide.</text:span></text:p>
            </draw:text-box>
          </draw:frame>
          <draw:frame draw:name="Slide Number Placehold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Community" draw:style-name="dp1" draw:master-page-name="Master_20_Slide_20_2">
        <office:forms form:automatic-focus="false" form:apply-design-mode="false"/>
        <draw:custom-shape draw:name="Google Shape;110;p15" draw:style-name="gr3" draw:text-style-name="P8" draw:layer="layout" svg:width="14.39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 2" draw:style-name="gr4" draw:text-style-name="P9" draw:layer="layout" svg:width="19.472cm" svg:height="19.049cm" svg:x="14.393cm" svg:y="0cm">
          <draw:image xlink:href="Pictures/10000000000009C400000682BDC7682B.jpg" xlink:type="simple" xlink:show="embed" xlink:actuate="onLoad" draw:mime-type="image/jpeg">
            <text:p/>
          </draw:image>
        </draw:frame>
        <draw:custom-shape draw:name="Google Shape;112;p 2" draw:style-name="gr5" draw:text-style-name="P11" draw:layer="layout" svg:width="10.575cm" svg:height="3.303cm" svg:x="1.974cm" svg:y="2.026cm">
          <text:p text:style-name="P10"><text:span text:style-name="T6">OWASP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6" draw:text-style-name="P11" draw:layer="layout" svg:width="10.575cm" svg:height="1.017cm" svg:x="1.974cm" svg:y="0.999cm">
          <text:p text:style-name="P10"><text:span text:style-name="T7">GETTING TO KNOW OWA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 2" draw:style-name="gr7" draw:text-style-name="P12" draw:layer="layout" svg:width="0.76cm" svg:height="0.146cm" svg:x="2.305cm" svg:y="3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 2" draw:style-name="gr8" draw:text-style-name="P14" draw:layer="layout" svg:width="10.575cm" svg:height="9.052cm" svg:x="1.974cm" svg:y="6.509cm">
          <text:p text:style-name="P13"><text:span text:style-name="T8">OWASP is a worldwide free and open community focused on improving the security of application software.</text:span><text:span text:style-name="T8"><text:line-break/></text:span><text:span text:style-name="T8"/></text:p>
          <text:p text:style-name="P13"><text:span text:style-name="T8">Our mission is to make application security visible so that people and organizations can make informed decisions about application security ris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 2" draw:style-name="gr9" draw:text-style-name="P16" draw:layer="layout" svg:width="0.91cm" svg:height="0.64cm" svg:x="32.081cm" svg:y="17.675cm">
          <text:p text:style-name="P15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 2" draw:style-name="gr10" draw:text-style-name="P18" draw:layer="layout" svg:width="0.456cm" svg:height="0.637cm" svg:x="31.852cm" svg:y="17.675cm">
          <text:p text:style-name="P17"><text:span text:style-name="T10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3" draw:style-name="gr11" draw:text-style-name="P16" draw:layer="layout" svg:width="17.651cm" svg:height="0.637cm" svg:x="14.247cm" svg:y="17.675cm"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text:p text:style-name="P15"><text:span text:style-name="T11">© 2024 OWASP Foundation, Inc. This work is licensed under Creative Commons Attribution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9" draw:layer="layout" svg:width="2.539cm" svg:height="1.138cm" svg:x="30.811cm" svg:y="0.41cm">
          <draw:image xlink:href="Pictures/1000000100001D3900000D1A57282D28.png" xlink:type="simple" xlink:show="embed" xlink:actuate="onLoad" draw:mime-type="image/png">
            <text:p/>
          </draw:image>
          <svg:desc>A blue and black logo

Description automatically generated</svg:desc>
        </draw:frame>
        <presentation:notes draw:style-name="dp3">
          <draw:frame draw:name="Google Shape;107;p4:notes" presentation:style-name="pr4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8;p4:notes 2" draw:style-name="gr2" draw:layer="layout" svg:width="16.932cm" svg:height="9.524cm" svg:x="1.058cm" svg:y="1.905cm" draw:page-number="2" presentation:class="page"/>
        </presentation:notes>
      </draw:page>
      <draw:page draw:name="Libre open source" draw:style-name="dp1" draw:master-page-name="Master_20_Slide_20_3">
        <office:forms form:automatic-focus="false" form:apply-design-mode="false"/>
        <draw:custom-shape draw:name="Google Shape;124;p16" draw:style-name="gr13" draw:text-style-name="P8" draw:layer="layout" svg:width="11.852cm" svg:height="9.524cm" svg:x="0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 2" draw:style-name="gr14" draw:text-style-name="P9" draw:layer="layout" svg:width="13.25cm" svg:height="16.345cm" svg:x="2.563cm" svg:y="0cm">
          <draw:image xlink:href="Pictures/100000000000055500000800582F8EEC.jpg" xlink:type="simple" xlink:show="embed" xlink:actuate="onLoad" draw:mime-type="image/jpeg">
            <text:p/>
          </draw:image>
        </draw:frame>
        <draw:custom-shape draw:name="Google Shape;126;p 2" draw:style-name="gr15" draw:text-style-name="P11" draw:layer="layout" svg:width="13.738cm" svg:height="1.779cm" svg:x="18.052cm" svg:y="3.945cm">
          <text:p text:style-name="P10"><text:span text:style-name="T12">IT’S ALL FOR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 2" draw:style-name="gr16" draw:text-style-name="P11" draw:layer="layout" svg:width="13.738cm" svg:height="1.017cm" svg:x="18.052cm" svg:y="2.918cm">
          <text:p text:style-name="P10"><text:span text:style-name="T7">GETTING TO KNOW OWA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 2" draw:style-name="gr17" draw:text-style-name="P12" draw:layer="layout" svg:width="0.76cm" svg:height="0.146cm" svg:x="18.383cm" svg:y="5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 2" draw:style-name="gr18" draw:text-style-name="P14" draw:layer="layout" svg:width="13.738cm" svg:height="8.037cm" svg:x="18.052cm" svg:y="6.67cm">
          <text:p text:style-name="P13"><text:span text:style-name="T13">Everyone is free to participate in OWASP, and all of our materials are available for free and with an open software license.</text:span><text:span text:style-name="T13"><text:line-break/></text:span><text:span text:style-name="T13"/></text:p>
          <text:p text:style-name="P13"><text:span text:style-name="T13">Most OWASP events are free for both members and non-members and can be attended by anyone interested in Application Security and Cyber Security in gener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2" draw:style-name="gr19" draw:text-style-name="P16" draw:layer="layout" svg:width="0.91cm" svg:height="0.64cm" svg:x="32.081cm" svg:y="17.675cm">
          <text:p text:style-name="P15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 2" draw:style-name="gr20" draw:text-style-name="P18" draw:layer="layout" svg:width="0.456cm" svg:height="0.637cm" svg:x="31.852cm" svg:y="17.675cm">
          <text:p text:style-name="P17"><text:span text:style-name="T10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1" draw:style-name="gr21" draw:text-style-name="P16" draw:layer="layout" svg:width="17.651cm" svg:height="0.637cm" svg:x="14.247cm" svg:y="17.675cm"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text:p text:style-name="P15"><text:span text:style-name="T11">© 2024 OWASP Foundation, Inc. This work is licensed under Creative Commons Attribution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2" draw:text-style-name="P9" draw:layer="layout" svg:width="2.539cm" svg:height="1.138cm" svg:x="30.811cm" svg:y="0.41cm">
          <draw:image xlink:href="Pictures/1000000100001D3900000D1A57282D28.png" xlink:type="simple" xlink:show="embed" xlink:actuate="onLoad" draw:mime-type="image/png">
            <text:p/>
          </draw:image>
          <svg:desc>A blue and black logo

Description automatically generated</svg:desc>
        </draw:frame>
        <presentation:notes draw:style-name="dp3">
          <draw:frame draw:name="Google Shape;121;p5:notes" presentation:style-name="pr5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5:notes 2" draw:style-name="gr2" draw:layer="layout" svg:width="16.932cm" svg:height="9.524cm" svg:x="1.058cm" svg:y="1.905cm" draw:page-number="3" presentation:class="page"/>
        </presentation:notes>
      </draw:page>
      <draw:page draw:name="Quiz" draw:style-name="dp1" draw:master-page-name="Title_20_and_20_Content" presentation:presentation-page-layout-name="AL2T11">
        <office:forms form:automatic-focus="false" form:apply-design-mode="false"/>
        <draw:frame draw:style-name="gr1" draw:text-style-name="P3" draw:layer="layout" svg:width="31.185cm" svg:height="11.5cm" svg:x="1.554cm" svg:y="3.897cm">
          <draw:image xlink:href="Pictures/10000000000003740000014626AA6527.jpg" xlink:type="simple" xlink:show="embed" xlink:actuate="onLoad" draw:mime-type="image/jpeg">
            <text:p/>
          </draw:image>
        </draw:frame>
        <draw:frame draw:name="Title 2" presentation:style-name="pr6" draw:text-style-name="P21" draw:layer="layout" svg:width="11.641cm" svg:height="2.16cm" svg:x="1.694cm" svg:y="1.015cm" presentation:class="title" presentation:user-transformed="true">
          <draw:text-box>
            <text:p text:style-name="P20"><text:span text:style-name="T1">BSides Bristol</text:span></text:p>
          </draw:text-box>
        </draw:frame>
        <draw:frame draw:name="Title 5" presentation:style-name="pr6" draw:text-style-name="P21" draw:layer="layout" svg:width="15.24cm" svg:height="2.16cm" svg:x="1.27cm" svg:y="15.875cm" presentation:class="title" presentation:user-transformed="true">
          <draw:text-box>
            <text:p text:style-name="P20"><text:span text:style-name="T14">Friday 21st &amp; Saturday 22nd August 2026</text:span></text:p>
          </draw:text-box>
        </draw:frame>
        <draw:frame draw:style-name="gr22" draw:text-style-name="P22" draw:layer="layout" svg:width="12.065cm" svg:height="1.27cm" svg:x="20.32cm" svg:y="16.51cm">
          <draw:text-box>
            <text:p>https://www.bsidesbristol.org.uk/</text:p>
          </draw:text-box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3" presentation:style-name="pr6" draw:text-style-name="P21" draw:layer="layout" svg:width="15.24cm" svg:height="2.16cm" svg:x="1.27cm" svg:y="1.015cm" presentation:class="title" presentation:user-transformed="true">
          <draw:text-box>
            <text:p text:style-name="P20"><text:span text:style-name="T1">BSides Cheltenham</text:span></text:p>
          </draw:text-box>
        </draw:frame>
        <draw:frame draw:name="Title 4" presentation:style-name="pr6" draw:text-style-name="P21" draw:layer="layout" svg:width="11.43cm" svg:height="2.16cm" svg:x="19.567cm" svg:y="1.223cm" presentation:class="title" presentation:user-transformed="true">
          <draw:text-box>
            <text:p text:style-name="P20"><text:span text:style-name="T14">Saturday 3rd October 2026</text:span></text:p>
          </draw:text-box>
        </draw:frame>
        <draw:frame draw:style-name="gr22" draw:text-style-name="P25" draw:layer="layout" svg:width="12.065cm" svg:height="1.27cm" svg:x="20.32cm" svg:y="16.51cm">
          <draw:text-box>
            <text:p text:style-name="P24">https://bsidescheltenham.org.uk/</text:p>
          </draw:text-box>
        </draw:frame>
        <draw:frame draw:style-name="gr1" draw:text-style-name="P3" draw:layer="layout" svg:width="31.06cm" svg:height="10.902cm" svg:x="1.325cm" svg:y="3.81cm">
          <draw:image xlink:href="Pictures/10000000000007CA000002BCB2907DE8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6" presentation:style-name="pr6" draw:text-style-name="P21" draw:layer="layout" svg:width="11.43cm" svg:height="2.16cm" svg:x="19.685cm" svg:y="12.445cm" presentation:class="title" presentation:user-transformed="true">
          <draw:text-box>
            <text:p text:style-name="P20"><text:span text:style-name="T14">Friday 9</text:span><text:span text:style-name="T15">th</text:span><text:span text:style-name="T14"> October 2026</text:span></text:p>
          </draw:text-box>
        </draw:frame>
        <draw:frame draw:style-name="gr22" draw:text-style-name="P22" draw:layer="layout" svg:width="12.065cm" svg:height="1.27cm" svg:x="19.685cm" svg:y="15.24cm">
          <draw:text-box>
            <text:p>https://www.csides.uk/</text:p>
          </draw:text-box>
        </draw:frame>
        <draw:frame draw:style-name="gr1" draw:text-style-name="P3" draw:layer="layout" svg:width="15.241cm" svg:height="15.241cm" svg:x="1.904cm" svg:y="1.905cm">
          <draw:image xlink:href="Pictures/100000000000023A0000023A344F9C87.jpg" xlink:type="simple" xlink:show="embed" xlink:actuate="onLoad" draw:mime-type="image/jpeg">
            <text:p/>
          </draw:image>
        </draw:frame>
        <draw:frame draw:style-name="gr1" draw:text-style-name="P3" draw:layer="layout" svg:width="15.24cm" svg:height="6.632cm" svg:x="17.78cm" svg:y="4.798cm">
          <draw:image xlink:href="Pictures/100000010000053000000242A24733A1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23" draw:text-style-name="P29" draw:layer="layout" svg:width="23.495cm" svg:height="2.252cm" svg:x="2.54cm" svg:y="1.905cm">
          <draw:text-box>
            <text:p text:style-name="P27"><text:span text:style-name="T16">South West UK Chartering Chapter Start-up</text:span></text:p>
            <text:p text:style-name="P28"/>
          </draw:text-box>
        </draw:frame>
        <draw:frame draw:style-name="gr1" draw:text-style-name="P3" draw:layer="layout" svg:width="27.553cm" svg:height="11.217cm" svg:x="2.927cm" svg:y="5.08cm">
          <draw:image xlink:href="Pictures/10000001000008F6000003A6B9D76B64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7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1" draw:text-style-name="P3" draw:layer="layout" svg:width="32.357cm" svg:height="13.335cm" svg:x="0.663cm" svg:y="3.175cm">
          <draw:image xlink:href="Pictures/10000001000004C2000001F6FC08B84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Barlow" svg:font-family="Barlow"/>
    <style:font-face style:name="Barlow Medium" svg:font-family="'Barlow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" svg:font-family="Poppins"/>
    <style:font-face style:name="Poppins Light" svg:font-family="'Poppins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" draw:display-name="msFillGradient 1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10" draw:display-name="msFillGradient 10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11" draw:display-name="msFillGradient 11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2" draw:display-name="msFillGradient 2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3" draw:display-name="msFillGradient 3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4" draw:display-name="msFillGradient 4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5" draw:display-name="msFillGradient 5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6" draw:display-name="msFillGradient 6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7" draw:display-name="msFillGradient 7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8" draw:display-name="msFillGradient 8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9" draw:display-name="msFillGradient 9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gradient" draw:fill-gradient-name="msFillGradient_20_3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4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background" style:display-name="Section Header-background" style:family="presentation">
      <style:graphic-properties draw:stroke="none" draw:fill="gradient" draw:fill-gradient-name="msFillGradient_20_5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gradient" draw:fill-gradient-name="msFillGradient_20_6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background" style:family="presentation">
      <style:graphic-properties draw:stroke="none" draw:fill="gradient" draw:fill-gradient-name="msFillGradient_20_7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gradient" draw:fill-gradient-name="msFillGradient_20_8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background" style:family="presentation">
      <style:graphic-properties draw:stroke="none" draw:fill="gradient" draw:fill-gradient-name="msFillGradient_20_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gradient" draw:fill-gradient-name="msFillGradient_20_10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gradient" draw:fill-gradient-name="msFillGradient_20_11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Master_20_Slide_20_1-background" style:display-name="Master Slide 1-background" style:family="presentation">
      <style:graphic-properties draw:stroke="none" draw:fill="solid" draw:fill-color="#f2f2f2"/>
      <style:text-properties style:letter-kerning="true"/>
    </style:style>
    <style:style style:name="Master_20_Slide_20_1-backgroundobjects" style:display-name="Master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1-notes" style:display-name="Master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1-outline1" style:display-name="Master Slide 1-outline1" style:family="presentation">
      <style:graphic-properties draw:stroke="none" draw:fill="none" draw:auto-grow-height="false" draw:fit-to-size="false" style:shrink-to-fit="true" style:writing-mode="lr-tb">
        <text:list-style style:name="Master_20_Slide_20_1-outline1" style:display-name="Master Slide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1-outline2" style:display-name="Master Slide 1-outline2" style:family="presentation" style:parent-style-name="Master_20_Slide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3" style:display-name="Master Slide 1-outline3" style:family="presentation" style:parent-style-name="Master_20_Slide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4" style:display-name="Master Slide 1-outline4" style:family="presentation" style:parent-style-name="Master_20_Slide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5" style:display-name="Master Slide 1-outline5" style:family="presentation" style:parent-style-name="Master_20_Slide_20_1-outline4">
      <style:paragraph-properties fo:margin-top="0.1cm" fo:margin-bottom="0cm"/>
      <style:text-properties fo:font-size="20pt" style:font-size-asian="20pt" style:font-size-complex="20pt"/>
    </style:style>
    <style:style style:name="Master_20_Slide_20_1-outline6" style:display-name="Master Slide 1-outline6" style:family="presentation" style:parent-style-name="Master_20_Slide_20_1-outline5">
      <style:paragraph-properties fo:margin-top="0.1cm" fo:margin-bottom="0cm"/>
      <style:text-properties fo:font-size="20pt" style:font-size-asian="20pt" style:font-size-complex="20pt"/>
    </style:style>
    <style:style style:name="Master_20_Slide_20_1-outline7" style:display-name="Master Slide 1-outline7" style:family="presentation" style:parent-style-name="Master_20_Slide_20_1-outline6">
      <style:paragraph-properties fo:margin-top="0.1cm" fo:margin-bottom="0cm"/>
      <style:text-properties fo:font-size="20pt" style:font-size-asian="20pt" style:font-size-complex="20pt"/>
    </style:style>
    <style:style style:name="Master_20_Slide_20_1-outline8" style:display-name="Master Slide 1-outline8" style:family="presentation" style:parent-style-name="Master_20_Slide_20_1-outline7">
      <style:paragraph-properties fo:margin-top="0.1cm" fo:margin-bottom="0cm"/>
      <style:text-properties fo:font-size="20pt" style:font-size-asian="20pt" style:font-size-complex="20pt"/>
    </style:style>
    <style:style style:name="Master_20_Slide_20_1-outline9" style:display-name="Master Slide 1-outline9" style:family="presentation" style:parent-style-name="Master_20_Slide_20_1-outline8">
      <style:paragraph-properties fo:margin-top="0.1cm" fo:margin-bottom="0cm"/>
      <style:text-properties fo:font-size="20pt" style:font-size-asian="20pt" style:font-size-complex="20pt"/>
    </style:style>
    <style:style style:name="Master_20_Slide_20_1-subtitle" style:display-name="Master Slide 1-subtitle" style:family="presentation">
      <style:graphic-properties draw:stroke="none" draw:fill="none" draw:textarea-vertical-align="middle">
        <text:list-style style:name="Master_20_Slide_20_1-subtitle" style:display-name="Master Slide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1-title" style:display-name="Master Slide 1-title" style:family="presentation">
      <style:graphic-properties draw:stroke="none" draw:fill="none" draw:textarea-vertical-align="middle" style:writing-mode="lr-tb">
        <text:list-style style:name="Master_20_Slide_20_1-title" style:display-name="Master Slide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2-background" style:display-name="Master Slide 2-background" style:family="presentation">
      <style:graphic-properties draw:stroke="none" draw:fill="solid" draw:fill-color="#f2f2f2"/>
      <style:text-properties style:letter-kerning="true"/>
    </style:style>
    <style:style style:name="Master_20_Slide_20_2-backgroundobjects" style:display-name="Master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2-notes" style:display-name="Master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2-outline1" style:display-name="Master Slide 2-outline1" style:family="presentation">
      <style:graphic-properties draw:stroke="none" draw:fill="none" draw:auto-grow-height="false" draw:fit-to-size="false" style:shrink-to-fit="true" style:writing-mode="lr-tb">
        <text:list-style style:name="Master_20_Slide_20_2-outline1" style:display-name="Master Slid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2-outline2" style:display-name="Master Slide 2-outline2" style:family="presentation" style:parent-style-name="Master_20_Slide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3" style:display-name="Master Slide 2-outline3" style:family="presentation" style:parent-style-name="Master_20_Slide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4" style:display-name="Master Slide 2-outline4" style:family="presentation" style:parent-style-name="Master_20_Slide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5" style:display-name="Master Slide 2-outline5" style:family="presentation" style:parent-style-name="Master_20_Slide_20_2-outline4">
      <style:paragraph-properties fo:margin-top="0.1cm" fo:margin-bottom="0cm"/>
      <style:text-properties fo:font-size="20pt" style:font-size-asian="20pt" style:font-size-complex="20pt"/>
    </style:style>
    <style:style style:name="Master_20_Slide_20_2-outline6" style:display-name="Master Slide 2-outline6" style:family="presentation" style:parent-style-name="Master_20_Slide_20_2-outline5">
      <style:paragraph-properties fo:margin-top="0.1cm" fo:margin-bottom="0cm"/>
      <style:text-properties fo:font-size="20pt" style:font-size-asian="20pt" style:font-size-complex="20pt"/>
    </style:style>
    <style:style style:name="Master_20_Slide_20_2-outline7" style:display-name="Master Slide 2-outline7" style:family="presentation" style:parent-style-name="Master_20_Slide_20_2-outline6">
      <style:paragraph-properties fo:margin-top="0.1cm" fo:margin-bottom="0cm"/>
      <style:text-properties fo:font-size="20pt" style:font-size-asian="20pt" style:font-size-complex="20pt"/>
    </style:style>
    <style:style style:name="Master_20_Slide_20_2-outline8" style:display-name="Master Slide 2-outline8" style:family="presentation" style:parent-style-name="Master_20_Slide_20_2-outline7">
      <style:paragraph-properties fo:margin-top="0.1cm" fo:margin-bottom="0cm"/>
      <style:text-properties fo:font-size="20pt" style:font-size-asian="20pt" style:font-size-complex="20pt"/>
    </style:style>
    <style:style style:name="Master_20_Slide_20_2-outline9" style:display-name="Master Slide 2-outline9" style:family="presentation" style:parent-style-name="Master_20_Slide_20_2-outline8">
      <style:paragraph-properties fo:margin-top="0.1cm" fo:margin-bottom="0cm"/>
      <style:text-properties fo:font-size="20pt" style:font-size-asian="20pt" style:font-size-complex="20pt"/>
    </style:style>
    <style:style style:name="Master_20_Slide_20_2-subtitle" style:display-name="Master Slide 2-subtitle" style:family="presentation">
      <style:graphic-properties draw:stroke="none" draw:fill="none" draw:textarea-vertical-align="middle">
        <text:list-style style:name="Master_20_Slide_20_2-subtitle" style:display-name="Master Slid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2-title" style:display-name="Master Slide 2-title" style:family="presentation">
      <style:graphic-properties draw:stroke="none" draw:fill="none" draw:textarea-vertical-align="middle" style:writing-mode="lr-tb">
        <text:list-style style:name="Master_20_Slide_20_2-title" style:display-name="Master Slid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3-background" style:display-name="Master Slide 3-background" style:family="presentation">
      <style:graphic-properties draw:stroke="none" draw:fill="solid" draw:fill-color="#f2f2f2"/>
      <style:text-properties style:letter-kerning="true"/>
    </style:style>
    <style:style style:name="Master_20_Slide_20_3-backgroundobjects" style:display-name="Master Slid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3-notes" style:display-name="Master Slid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3-outline1" style:display-name="Master Slide 3-outline1" style:family="presentation">
      <style:graphic-properties draw:stroke="none" draw:fill="none" draw:auto-grow-height="false" draw:fit-to-size="false" style:shrink-to-fit="true" style:writing-mode="lr-tb">
        <text:list-style style:name="Master_20_Slide_20_3-outline1" style:display-name="Master Slide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3-outline2" style:display-name="Master Slide 3-outline2" style:family="presentation" style:parent-style-name="Master_20_Slide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3" style:display-name="Master Slide 3-outline3" style:family="presentation" style:parent-style-name="Master_20_Slide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4" style:display-name="Master Slide 3-outline4" style:family="presentation" style:parent-style-name="Master_20_Slide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5" style:display-name="Master Slide 3-outline5" style:family="presentation" style:parent-style-name="Master_20_Slide_20_3-outline4">
      <style:paragraph-properties fo:margin-top="0.1cm" fo:margin-bottom="0cm"/>
      <style:text-properties fo:font-size="20pt" style:font-size-asian="20pt" style:font-size-complex="20pt"/>
    </style:style>
    <style:style style:name="Master_20_Slide_20_3-outline6" style:display-name="Master Slide 3-outline6" style:family="presentation" style:parent-style-name="Master_20_Slide_20_3-outline5">
      <style:paragraph-properties fo:margin-top="0.1cm" fo:margin-bottom="0cm"/>
      <style:text-properties fo:font-size="20pt" style:font-size-asian="20pt" style:font-size-complex="20pt"/>
    </style:style>
    <style:style style:name="Master_20_Slide_20_3-outline7" style:display-name="Master Slide 3-outline7" style:family="presentation" style:parent-style-name="Master_20_Slide_20_3-outline6">
      <style:paragraph-properties fo:margin-top="0.1cm" fo:margin-bottom="0cm"/>
      <style:text-properties fo:font-size="20pt" style:font-size-asian="20pt" style:font-size-complex="20pt"/>
    </style:style>
    <style:style style:name="Master_20_Slide_20_3-outline8" style:display-name="Master Slide 3-outline8" style:family="presentation" style:parent-style-name="Master_20_Slide_20_3-outline7">
      <style:paragraph-properties fo:margin-top="0.1cm" fo:margin-bottom="0cm"/>
      <style:text-properties fo:font-size="20pt" style:font-size-asian="20pt" style:font-size-complex="20pt"/>
    </style:style>
    <style:style style:name="Master_20_Slide_20_3-outline9" style:display-name="Master Slide 3-outline9" style:family="presentation" style:parent-style-name="Master_20_Slide_20_3-outline8">
      <style:paragraph-properties fo:margin-top="0.1cm" fo:margin-bottom="0cm"/>
      <style:text-properties fo:font-size="20pt" style:font-size-asian="20pt" style:font-size-complex="20pt"/>
    </style:style>
    <style:style style:name="Master_20_Slide_20_3-subtitle" style:display-name="Master Slide 3-subtitle" style:family="presentation">
      <style:graphic-properties draw:stroke="none" draw:fill="none" draw:textarea-vertical-align="middle">
        <text:list-style style:name="Master_20_Slide_20_3-subtitle" style:display-name="Master Slide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3-title" style:display-name="Master Slide 3-title" style:family="presentation">
      <style:graphic-properties draw:stroke="none" draw:fill="none" draw:textarea-vertical-align="middle" style:writing-mode="lr-tb">
        <text:list-style style:name="Master_20_Slide_20_3-title" style:display-name="Master Slide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solid" draw:fill-color="#f2f2f2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_20_Slid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Master_20_Slid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Master_20_Slid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Master_20_Slid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Master_20_Slid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Master_20_Slid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8" style:family="paragraph">
      <style:paragraph-properties fo:text-align="center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8"><presentation:date-time/></text:span></text:p>
        </draw:text-box>
      </draw:frame>
      <draw:frame draw:name="Footer Placeholder 4" presentation:style-name="Mpr8" draw:text-style-name="MP9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3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Vertical Title 1" presentation:style-name="Mpr11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2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3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3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4">
      <office:forms form:automatic-focus="false" form:apply-design-mode="false"/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1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7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5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21" draw:text-style-name="MP7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2" draw:text-style-name="MP20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9"><text:span text:style-name="MT9">Click to edit Master text styles</text:span></text:p>
            </text:list-item>
          </text:list>
        </draw:text-box>
      </draw:frame>
      <draw:frame draw:name="Footer Placeholder 4" presentation:style-name="Mpr23" draw:text-style-name="MP9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23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6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2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7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2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2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7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31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2" draw:text-style-name="MP20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9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5" presentation:style-name="Mpr33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34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8" presentation:style-name="Mpr34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8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37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3" presentation:style-name="Mpr3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4" presentation:style-name="Mpr3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9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Footer Placeholder 2" presentation:style-name="Mpr41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3" presentation:style-name="Mpr41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0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44" draw:text-style-name="MP21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5" draw:text-style-name="MP21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Footer Placeholder 5" presentation:style-name="Mpr46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46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1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49" draw:text-style-name="MP21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50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Footer Placeholder 5" presentation:style-name="Mpr51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51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1" style:display-name="Master Slide 1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2;p2" presentation:style-name="Master_20_Slide_20_1-outline1" draw:layer="backgroundobjects" svg:width="33.866cm" svg:height="19.049cm" svg:x="0cm" svg:y="0cm" presentation:class="outline" presentation:placeholder="true" presentation:user-transformed="true">
        <draw:text-box/>
      </draw:frame>
      <draw:frame presentation:style-name="Master_20_Slide_20_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1-title" draw:layer="backgroundobjects" svg:width="19.798cm" svg:height="11.136cm" svg:x="0.6cm" svg:y="2.257cm" presentation:class="page"/>
        <draw:frame presentation:style-name="Master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2" style:display-name="Master Slide 2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5;p4" presentation:style-name="Master_20_Slide_20_2-outline1" draw:layer="backgroundobjects" svg:width="19.472cm" svg:height="19.049cm" svg:x="14.393cm" svg:y="0cm" presentation:class="outline" presentation:placeholder="true" presentation:user-transformed="true">
        <draw:text-box/>
      </draw:frame>
      <draw:frame presentation:style-name="Master_20_Slide_20_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2-title" draw:layer="backgroundobjects" svg:width="0.001cm" svg:height="0.001cm" svg:x="0cm" svg:y="2.257cm" presentation:class="page"/>
        <draw:frame presentation:style-name="Master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3" style:display-name="Master Slide 3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7;p5" presentation:style-name="Master_20_Slide_20_3-outline1" draw:layer="backgroundobjects" svg:width="13.25cm" svg:height="16.345cm" svg:x="2.563cm" svg:y="0cm" presentation:class="outline" presentation:placeholder="true" presentation:user-transformed="true">
        <draw:text-box/>
      </draw:frame>
      <draw:frame presentation:style-name="Master_20_Slide_20_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3-title" draw:layer="backgroundobjects" svg:width="0.001cm" svg:height="0.001cm" svg:x="0cm" svg:y="2.257cm" presentation:class="page"/>
        <draw:frame presentation:style-name="Master_20_Slide_20_3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van der Stock</meta:initial-creator>
    <meta:editing-cycles>24</meta:editing-cycles>
    <meta:creation-date>2024-08-22T16:50:02</meta:creation-date>
    <dc:date>2026-06-11T16:42:56.201853207</dc:date>
    <meta:editing-duration>P1DT9H27M</meta:editing-duration>
    <meta:generator>LibreOffice/24.8.3.2$MacOSX_AARCH64 LibreOffice_project/48a6bac9e7e268aeb4c3483fcf825c94556d9f92</meta:generator>
    <meta:document-statistic meta:object-count="214"/>
    <meta:user-defined meta:name="AppVersion">16.0000</meta:user-defined>
    <meta:user-defined meta:name="Notes" meta:value-type="float">5</meta:user-defined>
    <meta:user-defined meta:name="PresentationFormat">Widescreen</meta:user-defined>
    <meta:user-defined meta:name="Slides" meta:value-type="float">10</meta:user-defined>
  </office:meta>
</office:document-meta>
</file>